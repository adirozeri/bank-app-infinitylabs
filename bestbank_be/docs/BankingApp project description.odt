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8.3118in" table:align="left"/>
    </style:style>
    <style:style style:name="Table1.A" style:family="table-column">
      <style:table-column-properties style:column-width="5.0181in"/>
    </style:style>
    <style:style style:name="Table1.B" style:family="table-column">
      <style:table-column-properties style:column-width="1.8097in"/>
    </style:style>
    <style:style style:name="Table1.C" style:family="table-column">
      <style:table-column-properties style:column-width="0.7264in"/>
    </style:style>
    <style:style style:name="Table1.D" style:family="table-column">
      <style:table-column-properties style:column-width="0.7576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2" style:family="table">
      <style:table-properties style:width="6.8431in" table:align="left"/>
    </style:style>
    <style:style style:name="Table2.A" style:family="table-column">
      <style:table-column-properties style:column-width="1.5389in"/>
    </style:style>
    <style:style style:name="Table2.B" style:family="table-column">
      <style:table-column-properties style:column-width="1.7681in"/>
    </style:style>
    <style:style style:name="Table2.C" style:family="table-column">
      <style:table-column-properties style:column-width="1.3514in"/>
    </style:style>
    <style:style style:name="Table2.D" style:family="table-column">
      <style:table-column-properties style:column-width="2.1847in"/>
    </style:style>
    <style:style style:name="Table2.A1" style:family="table-cell">
      <style:table-cell-properties style:vertical-align="middle" fo:padding-left="0.0694in" fo:padding-right="0.0694in" fo:padding-top="0.0194in" fo:padding-bottom="0.0194in" fo:border="0.75pt solid #000000"/>
    </style:style>
    <style:style style:name="Table2.D1" style:family="table-cell">
      <style:table-cell-properties style:vertical-align="middle" fo:padding-left="0in" fo:padding-right="0.0694in" fo:padding-top="0.0194in" fo:padding-bottom="0.0194in" fo:border-left="none" fo:border-right="0.75pt solid #000000" fo:border-top="0.75pt solid #000000" fo:border-bottom="0.75pt solid #000000"/>
    </style:style>
    <style:style style:name="P1" style:family="paragraph" style:parent-style-name="Heading_20_1">
      <style:paragraph-properties fo:margin-left="0in" fo:margin-right="0in" fo:margin-top="0.3335in" fo:margin-bottom="0in" style:contextual-spacing="false" fo:line-height="84%" fo:text-indent="0in" style:auto-text-indent="false" style:writing-mode="lr-tb"/>
      <style:text-properties fo:font-variant="normal" fo:text-transform="none" fo:color="#365f91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rl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rl-tb"/>
      <style:text-properties fo:font-variant="normal" fo:text-transform="none" fo:color="#0f4761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Heading_20_1">
      <style:paragraph-properties fo:margin-left="0in" fo:margin-right="0in" fo:margin-top="0in" fo:margin-bottom="0.139in" style:contextual-spacing="false" fo:line-height="138%" fo:text-indent="0in" style:auto-text-indent="false" style:writing-mode="lr-tb"/>
      <style:text-properties fo:font-variant="normal" fo:text-transform="none" fo:color="#0f4761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rl-tb"/>
      <style:text-properties fo:font-variant="normal" fo:text-transform="none" fo:color="#0f4761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Heading_20_2">
      <style:paragraph-properties fo:margin-left="0in" fo:margin-right="0in" fo:margin-top="0.139in" fo:margin-bottom="0in" style:contextual-spacing="false" fo:line-height="105%" fo:text-indent="0in" style:auto-text-indent="false" style:writing-mode="lr-tb"/>
      <style:text-properties fo:font-variant="normal" fo:text-transform="none" fo:color="#4f81bd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left="0in" fo:margin-right="0in" fo:text-indent="0in" style:auto-text-indent="false"/>
    </style:style>
    <style:style style:name="P8" style:family="paragraph" style:parent-style-name="Table_20_Contents">
      <style:paragraph-properties fo:margin-left="0in" fo:margin-right="0in" fo:text-indent="0in" style:auto-text-indent="false" style:writing-mode="lr-tb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rl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rl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5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left="0in" fo:margin-right="0in" fo:margin-top="0in" fo:margin-bottom="0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2">
      <loext:graphic-properties draw:fill="none" draw:fill-color="#ffffff"/>
      <style:paragraph-properties fo:margin-left="0in" fo:margin-right="0in" fo:margin-top="0in" fo:margin-bottom="0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line-height="13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left="0in" fo:margin-right="0.3055in" fo:margin-top="0in" fo:margin-bottom="0.111in" style:contextual-spacing="false" fo:line-height="139%" fo:text-align="start" style:justify-single-word="false" fo:text-indent="0in" style:auto-text-indent="false" style:writing-mode="rl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3">
      <loext:graphic-properties draw:fill="none" draw:fill-color="#ffffff"/>
      <style:paragraph-properties fo:margin-left="0in" fo:margin-right="0in" fo:margin-top="0in" fo:margin-bottom="0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3">
      <loext:graphic-properties draw:fill="none" draw:fill-color="#ffffff"/>
      <style:paragraph-properties fo:margin-left="0in" fo:margin-right="0in" fo:margin-top="0in" fo:margin-bottom="0.111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4">
      <loext:graphic-properties draw:fill="none" draw:fill-color="#ffffff"/>
      <style:paragraph-properties fo:margin-left="0in" fo:margin-right="0in" fo:margin-top="0in" fo:margin-bottom="0.111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6">
      <loext:graphic-properties draw:fill="none" draw:fill-color="#ffffff"/>
      <style:paragraph-properties fo:margin-left="0.5in" fo:margin-right="0in" fo:margin-top="0in" fo:margin-bottom="0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21" style:family="paragraph" style:parent-style-name="Table_20_Contents" style:list-style-name="L6">
      <loext:graphic-properties draw:fill="none" draw:fill-color="#ffffff"/>
      <style:paragraph-properties fo:margin-left="0in" fo:margin-right="0in" fo:margin-top="0in" fo:margin-bottom="0.111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3" style:family="paragraph" style:parent-style-name="Table_20_Contents" style:list-style-name="L6">
      <loext:graphic-properties draw:fill="none" draw:fill-color="#ffffff"/>
      <style:paragraph-properties fo:margin-left="0.5in" fo:margin-right="0in" fo:margin-top="0in" fo:margin-bottom="0in" style:contextual-spacing="false" fo:line-height="13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left="0in" fo:margin-right="0in" fo:margin-top="0in" fo:margin-bottom="0.111in" style:contextual-spacing="false" fo:line-height="13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tos" fo:font-size="17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in" fo:margin-bottom="0.111in" style:contextual-spacing="false" fo:line-height="13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tos" fo:font-size="13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font-name="Arial" fo:font-size="15pt" fo:font-style="normal" style:text-underline-style="solid" style:text-underline-width="auto" style:text-underline-color="font-color" fo:font-weight="bold" fo:background-color="transparent"/>
    </style:style>
    <style:style style:name="P32" style:family="paragraph" style:parent-style-name="Text_20_body">
      <style:paragraph-properties fo:margin-left="0in" fo:margin-right="0in" fo:margin-top="0.1665in" fo:margin-bottom="0.1665in" style:contextual-spacing="false" fo:line-height="139%" fo:text-indent="0in" style:auto-text-indent="false" style:writing-mode="lr-tb"/>
      <style:text-properties fo:font-weight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/>
    </style:style>
    <style:style style:name="P34" style:family="paragraph" style:parent-style-name="Text_20_body">
      <style:text-properties fo:font-weight="normal"/>
    </style:style>
    <style:style style:name="P35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6" style:family="text">
      <style:text-properties style:font-name="Aptos" fo:font-size="12pt" fo:font-style="normal" fo:font-weight="normal"/>
    </style:style>
    <style:style style:name="T7" style:family="text">
      <style:text-properties fo:font-weight="normal"/>
    </style:style>
    <style:style style:name="T8" style:family="text">
      <style:text-properties style:font-name="Arial" fo:font-size="11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d588ee54-7fff-0d48-b0ff-b4c6685ec2e7"/></text:p>
      <text:p text:style-name="P24">Worksheet for Web Banking Application</text:p>
      <text:p text:style-name="P25">Goal</text:p>
      <text:p text:style-name="P32"><text:span text:style-name="T1">Develop a </text:span><text:span text:style-name="T2">full-stack web banking platform</text:span><text:span text:style-name="T3"> </text:span><text:span text:style-name="T1">that allows users to </text:span><text:span text:style-name="T2">register, verify their identity via SMS or Email</text:span><text:span text:style-name="T1">, log in securely, manage their account, transfer money to other users, and interact with a </text:span><text:span text:style-name="T2">Digital Customer Service</text:span><text:span text:style-name="T3"> </text:span><text:span text:style-name="T1">system — all through a modern and responsive web interface.</text:span></text:p>
      <text:p text:style-name="Text_20_body"/>
      <text:p text:style-name="P31">Develop a web banking application</text:p>
      <text:p text:style-name="P29">Overview</text:p>
      <text:p text:style-name="P26">In this task, you need to build a web application for a bank. The user will be able to</text:p>
      <text:p text:style-name="P26">sign-up &amp; sign in to the bank using a username &amp; password, and validating their</text:p>
      <text:p text:style-name="P26">phone number/ email using a one-time passcode sent by SMS/Email  message.</text:p>
      <text:p text:style-name="Text_20_body"/>
      <text:p text:style-name="P29">Technical notes</text:p>
      <text:p text:style-name="P26">1. Use React for frontend, NodeJS for server, Mongo for DB.</text:p>
      <text:p text:style-name="P26">2. Implement the Figma designs for the application UI.</text:p>
      <text:p text:style-name="P26">3. Use Twilio integration for SMS service Or email validation.</text:p>
      <text:p text:style-name="P26">4. The web application needs to be hosted on a platform of your choice.</text:p>
      <text:p text:style-name="P33"><text:span text:style-name="T4">5. </text:span><text:span text:style-name="T5">You can use AI tools !</text:span></text:p>
      <text:p text:style-name="Text_20_body"/>
      <text:p text:style-name="P29">Requirements</text:p>
      <text:p text:style-name="P29">1. Sign up</text:p>
      <text:p text:style-name="P27">a) The user can sign up to the bank by choosing an email address, a password,</text:p>
      <text:p text:style-name="P27">and inserting their phone number.</text:p>
      <text:p text:style-name="P27">b) user canʼt register with the same email address more than once (otherwise,</text:p>
      <text:p text:style-name="P27">present an error message).</text:p>
      <text:p text:style-name="P27">c) Validate that the entered email address format and the phone number</text:p>
      <text:p text:style-name="P30">    <text:span text:style-name="T8">format are valid.</text:span></text:p>
      <text:p text:style-name="P29">2. Phone/ Email validation</text:p>
      <text:p text:style-name="P27">a) During sign up, an SMS / Email message with a passcode (6 random digits) is sent to</text:p>
      <text:p text:style-name="P27">the user in order to validate their phone number / email.</text:p>
      <text:p text:style-name="P27">b) Once the user enters the correct passcode, the registration process is</text:p>
      <text:p text:style-name="P27">succeeded and the user is redirected to the dashboard.</text:p>
      <text:p text:style-name="P27">c) If the passcode is not correct, show an error message.</text:p>
      <text:p text:style-name="P29">3. Dashboard</text:p>
      <text:p text:style-name="P27">a) The dashboard page is protected, access only after sign up / sign in</text:p>
      <text:p text:style-name="P27">b) A random account balance will be set once the user was sign up.</text:p>
      <text:p text:style-name="P27">c) The user can see their balance and recent transactions.</text:p>
      <text:p text:style-name="P27">d) The user can sign out by pressing the Sign Out button, and redirect to the login page.</text:p>
      <text:p text:style-name="P29">4. Login</text:p>
      <text:p text:style-name="P27">a) The user can sign in by inserting their correct email &amp; password.</text:p>
      <text:p text:style-name="P27">b) If validated, the user is redirected to the dashboard. Otherwise, present an</text:p>
      <text:p text:style-name="P27">error message.</text:p>
      <text:p text:style-name="P29">5. Transaction</text:p>
      <text:p text:style-name="P27">a) The user can send money to another registered user, by typing the userʼs email</text:p>
      <text:p text:style-name="P27">address &amp; amount, and press Submit.</text:p>
      <text:p text:style-name="P27">b) If the user doesnʼt have enough balance, or the email address doesnʼt exist,</text:p>
      <text:p text:style-name="P27">show an error message.</text:p>
      <text:p text:style-name="P27">c) Once submitted successfully, present another transaction record</text:p>
      <text:p text:style-name="P28">1. for sender: the receiver email &amp; the sent amount with ‘-ʼ sign.</text:p>
      <text:p text:style-name="P28">2. for receiver: the sender email &amp; the received amount with ‘+ʼ sign.</text:p>
      <text:p text:style-name="P33"><text:span text:style-name="T4">Phases</text:span><text:span text:style-name="T3"> </text:span></text:p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>Prerequisite</text:p>
          </table:table-cell>
          <table:table-cell table:style-name="Table1.A1" office:value-type="string">
            <text:p text:style-name="P9">Days</text:p>
          </table:table-cell>
          <table:table-cell table:style-name="Table1.A1" office:value-type="string">
            <text:p text:style-name="P9">Phase </text:p>
          </table:table-cell>
        </table:table-row>
        <table:table-row>
          <table:table-cell table:style-name="Table1.A1" office:value-type="string">
            <text:list text:style-name="L1">
              <text:list-item>
                <text:p text:style-name="P13">Define Rest API using swagger</text:p>
              </text:list-item>
              <text:list-item>
                <text:p text:style-name="P13">Relevant Sequence Diagram</text:p>
              </text:list-item>
            </text:list>
          </table:table-cell>
          <table:table-cell table:style-name="Table1.A1" office:value-type="string">
            <text:p text:style-name="P9">HTTP </text:p>
            <text:p text:style-name="P10">REST API + CRUD Principle</text:p>
            <text:p text:style-name="P10">Postman</text:p>
            <text:p text:style-name="P10">Swagger</text:p>
            <text:p text:style-name="P10">JWT - theory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1</text:p>
            <text:p text:style-name="P8"><text:line-break/><text:line-break/><text:line-break/></text:p>
          </table:table-cell>
        </table:table-row>
        <table:table-row>
          <table:table-cell table:style-name="Table1.A1" office:value-type="string">
            <text:list text:style-name="L2">
              <text:list-item>
                <text:p text:style-name="P14">Implementation of BE (no DB only use memory to store / retrieve data)</text:p>
              </text:list-item>
              <text:list-item>
                <text:p text:style-name="P14">Test using Postman</text:p>
              </text:list-item>
            </text:list>
            <text:p text:style-name="P7"/>
          </table:table-cell>
          <table:table-cell table:style-name="Table1.A1" office:value-type="string">
            <text:p text:style-name="P10">JS</text:p>
            <text:p text:style-name="P9">TypeScript  </text:p>
            <text:p text:style-name="P10">NODE.JS</text:p>
            <text:p text:style-name="P16">Express</text:p>
            <text:p text:style-name="P10">JWT 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2</text:p>
          </table:table-cell>
        </table:table-row>
        <table:table-row>
          <table:table-cell table:style-name="Table1.A1" office:value-type="string">
            <text:list text:style-name="L3">
              <text:list-item>
                <text:p text:style-name="P17">Design DB schema using swagger</text:p>
              </text:list-item>
              <text:list-item>
                <text:p text:style-name="P18">Implementation</text:p>
              </text:list-item>
            </text:list>
          </table:table-cell>
          <table:table-cell table:style-name="Table1.A1" office:value-type="string">
            <text:p text:style-name="P10">MongoDB</text:p>
            <text:p text:style-name="P10">Mongoose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3</text:p>
          </table:table-cell>
        </table:table-row>
        <table:table-row>
          <table:table-cell table:style-name="Table1.A1" office:value-type="string">
            <text:list text:style-name="L4">
              <text:list-item>
                <text:p text:style-name="P19">Run Backend on using docker</text:p>
              </text:list-item>
            </text:list>
          </table:table-cell>
          <table:table-cell table:style-name="Table1.A1" office:value-type="string">
            <text:p text:style-name="P9">Docke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4</text:p>
          </table:table-cell>
        </table:table-row>
        <table:table-row>
          <table:table-cell table:style-name="Table1.A1" office:value-type="string">
            <text:list text:style-name="L5">
              <text:list-item>
                <text:p text:style-name="P12">Design UI / UX using </text:p>
              </text:list-item>
            </text:list>
            <text:p text:style-name="P22">               <text:span text:style-name="T6">Figma for 5 web pages.</text:span></text:p>
            <text:list text:style-name="L6">
              <text:list-item>
                <text:p text:style-name="P23"> <text:span text:style-name="T6">Registration</text:span></text:p>
              </text:list-item>
              <text:list-item>
                <text:p text:style-name="P20">Login</text:p>
              </text:list-item>
              <text:list-item>
                <text:p text:style-name="P20">Logout</text:p>
              </text:list-item>
              <text:list-item>
                <text:p text:style-name="P20">Money Transfer Screen</text:p>
              </text:list-item>
              <text:list-item>
                <text:p text:style-name="P21">Dashboard</text:p>
              </text:list-item>
            </text:list>
          </table:table-cell>
          <table:table-cell table:style-name="Table1.A1" office:value-type="string">
            <text:p text:style-name="P10">Figma</text:p>
          </table:table-cell>
          <table:table-cell table:style-name="Table1.A1" office:value-type="string">
            <text:p text:style-name="P11">0.5</text:p>
          </table:table-cell>
          <table:table-cell table:style-name="Table1.A1" office:value-type="string">
            <text:p text:style-name="P11">5</text:p>
          </table:table-cell>
        </table:table-row>
        <table:table-row>
          <table:table-cell table:style-name="Table1.A1" office:value-type="string">
            <text:p text:style-name="P10">Implement Front End</text:p>
          </table:table-cell>
          <table:table-cell table:style-name="Table1.A1" office:value-type="string">
            <text:p text:style-name="P9">HTML, </text:p>
            <text:p text:style-name="P9">CSS,</text:p>
            <text:p text:style-name="P22"> <text:span text:style-name="T6">JS</text:span></text:p>
            <text:p text:style-name="P9">TypeScript  </text:p>
            <text:p text:style-name="P10">REACT</text:p>
            <text:p text:style-name="P9">Material UI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6</text:p>
          </table:table-cell>
        </table:table-row>
        <table:table-row>
          <table:table-cell table:style-name="Table1.A1" office:value-type="string">
            <text:p text:style-name="P10">Implement transfer money notification between customers</text:p>
          </table:table-cell>
          <table:table-cell table:style-name="Table1.A1" office:value-type="string">
            <text:p text:style-name="P10">Web Socket</text:p>
            <text:p text:style-name="P10">Socket.IO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7</text:p>
          </table:table-cell>
        </table:table-row>
        <table:table-row>
          <table:table-cell table:style-name="Table1.A1" office:value-type="string">
            <text:p text:style-name="P9">Implement Video Call between a person who sends the money to the person who receives the money</text:p>
          </table:table-cell>
          <table:table-cell table:style-name="Table1.A1" office:value-type="string">
            <text:p text:style-name="P9">Jitsi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8</text:p>
          </table:table-cell>
        </table:table-row>
        <table:table-row>
          <table:table-cell table:style-name="Table1.A1" office:value-type="string">
            <text:p text:style-name="P9">implement  customer service chat bot using LLM </text:p>
          </table:table-cell>
          <table:table-cell table:style-name="Table1.A1" office:value-type="string">
            <text:p text:style-name="P9">Open AI Package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9</text:p>
          </table:table-cell>
        </table:table-row>
        <table:table-row>
          <table:table-cell table:style-name="Table1.A1" office:value-type="string">
            <text:p text:style-name="P15">Implement Testing for BE</text:p>
          </table:table-cell>
          <table:table-cell table:style-name="Table1.A1" office:value-type="string">
            <text:p text:style-name="P10">jest + super test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0</text:p>
          </table:table-cell>
        </table:table-row>
        <table:table-row>
          <table:table-cell table:style-name="Table1.A1" office:value-type="string">
            <text:p text:style-name="P9">Add front end testing</text:p>
          </table:table-cell>
          <table:table-cell table:style-name="Table1.A1" office:value-type="string">
            <text:p text:style-name="P10">Cypress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1</text:p>
          </table:table-cell>
        </table:table-row>
      </table:table>
      <text:p text:style-name="P3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" text:outline-level="1">Keywords</text:h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h text:style-name="P2" text:outline-level="1">Technical Stack Keywords</text:h>
          </table:table-cell>
          <table:table-cell table:style-name="Table2.A1" office:value-type="string">
            <text:h text:style-name="P2" text:outline-level="1">Functional / Feature Keywords</text:h>
          </table:table-cell>
          <table:table-cell table:style-name="Table2.A1" office:value-type="string">
            <text:h text:style-name="P2" text:outline-level="1">Security &amp; Architecture Keywords</text:h>
          </table:table-cell>
          <table:table-cell table:style-name="Table2.D1" office:value-type="string">
            <text:h text:style-name="P2" text:outline-level="1">Development &amp; Testing Keywords</text:h>
          </table:table-cell>
        </table:table-row>
        <table:table-row>
          <table:table-cell table:style-name="Table2.A1" office:value-type="string">
            <text:h text:style-name="P3" text:outline-level="1">React</text:h>
          </table:table-cell>
          <table:table-cell table:style-name="Table2.A1" office:value-type="string">
            <text:h text:style-name="P3" text:outline-level="1">user registration</text:h>
          </table:table-cell>
          <table:table-cell table:style-name="Table2.A1" office:value-type="string">
            <text:h text:style-name="P3" text:outline-level="1">authentication</text:h>
          </table:table-cell>
          <table:table-cell table:style-name="Table2.D1" office:value-type="string">
            <text:h text:style-name="P3" text:outline-level="1">unit testing</text:h>
          </table:table-cell>
        </table:table-row>
        <table:table-row>
          <table:table-cell table:style-name="Table2.A1" office:value-type="string">
            <text:h text:style-name="P3" text:outline-level="1">TypeScript</text:h>
          </table:table-cell>
          <table:table-cell table:style-name="Table2.A1" office:value-type="string">
            <text:h text:style-name="P3" text:outline-level="1">login system</text:h>
          </table:table-cell>
          <table:table-cell table:style-name="Table2.A1" office:value-type="string">
            <text:h text:style-name="P3" text:outline-level="1">encryption</text:h>
          </table:table-cell>
          <table:table-cell table:style-name="Table2.D1" office:value-type="string">
            <text:h text:style-name="P3" text:outline-level="1">integration testing</text:h>
          </table:table-cell>
        </table:table-row>
        <table:table-row>
          <table:table-cell table:style-name="Table2.A1" office:value-type="string">
            <text:h text:style-name="P3" text:outline-level="1">Node.js</text:h>
          </table:table-cell>
          <table:table-cell table:style-name="Table2.A1" office:value-type="string">
            <text:h text:style-name="P3" text:outline-level="1">logout functionality</text:h>
          </table:table-cell>
          <table:table-cell table:style-name="Table2.A1" office:value-type="string">
            <text:h text:style-name="P3" text:outline-level="1">JWT tokens</text:h>
          </table:table-cell>
          <table:table-cell table:style-name="Table2.D1" office:value-type="string">
            <text:h text:style-name="P3" text:outline-level="1">end-to-end testing</text:h>
          </table:table-cell>
        </table:table-row>
        <table:table-row>
          <table:table-cell table:style-name="Table2.A1" office:value-type="string">
            <text:h text:style-name="P3" text:outline-level="1">Express.js</text:h>
          </table:table-cell>
          <table:table-cell table:style-name="Table2.A1" office:value-type="string">
            <text:h text:style-name="P3" text:outline-level="1">account verification</text:h>
          </table:table-cell>
          <table:table-cell table:style-name="Table2.A1" office:value-type="string">
            <text:h text:style-name="P3" text:outline-level="1">secure REST API</text:h>
          </table:table-cell>
          <table:table-cell table:style-name="Table2.D1" office:value-type="string">
            <text:h text:style-name="P3" text:outline-level="1">Cypress testing</text:h>
          </table:table-cell>
        </table:table-row>
        <table:table-row>
          <table:table-cell table:style-name="Table2.A1" office:value-type="string">
            <text:h text:style-name="P3" text:outline-level="1">MongoDB</text:h>
          </table:table-cell>
          <table:table-cell table:style-name="Table2.A1" office:value-type="string">
            <text:h text:style-name="P3" text:outline-level="1">money transfer</text:h>
          </table:table-cell>
          <table:table-cell table:style-name="Table2.A1" office:value-type="string">
            <text:h text:style-name="P3" text:outline-level="1">data validation</text:h>
          </table:table-cell>
          <table:table-cell table:style-name="Table2.D1" office:value-type="string">
            <text:h text:style-name="P3" text:outline-level="1">backend testing</text:h>
          </table:table-cell>
        </table:table-row>
        <table:table-row>
          <table:table-cell table:style-name="Table2.A1" office:value-type="string">
            <text:h text:style-name="P3" text:outline-level="1">Mongoose</text:h>
          </table:table-cell>
          <table:table-cell table:style-name="Table2.A1" office:value-type="string">
            <text:h text:style-name="P3" text:outline-level="1">protected routes</text:h>
          </table:table-cell>
          <table:table-cell table:style-name="Table2.A1" office:value-type="string">
            <text:h text:style-name="P3" text:outline-level="1">session security</text:h>
          </table:table-cell>
          <table:table-cell table:style-name="Table2.D1" office:value-type="string">
            <text:h text:style-name="P3" text:outline-level="1">frontend testing</text:h>
          </table:table-cell>
        </table:table-row>
        <table:table-row>
          <table:table-cell table:style-name="Table2.A1" office:value-type="string">
            <text:h text:style-name="P3" text:outline-level="1">JWT authentication</text:h>
          </table:table-cell>
          <table:table-cell table:style-name="Table2.A1" office:value-type="string">
            <text:h text:style-name="P3" text:outline-level="1">unique email validation</text:h>
          </table:table-cell>
          <table:table-cell table:style-name="Table2.A1" office:value-type="string">
            <text:h text:style-name="P3" text:outline-level="1">role-based access</text:h>
          </table:table-cell>
          <table:table-cell table:style-name="Table2.D1" office:value-type="string">
            <text:h text:style-name="P3" text:outline-level="1">CI/CD pipeline</text:h>
          </table:table-cell>
        </table:table-row>
        <table:table-row>
          <table:table-cell table:style-name="Table2.A1" office:value-type="string">
            <text:h text:style-name="P3" text:outline-level="1">REST API</text:h>
          </table:table-cell>
          <table:table-cell table:style-name="Table2.A1" office:value-type="string">
            <text:h text:style-name="P3" text:outline-level="1">session management</text:h>
          </table:table-cell>
          <table:table-cell table:style-name="Table2.A1" office:value-type="string">
            <text:h text:style-name="P3" text:outline-level="1">API rate limiting</text:h>
          </table:table-cell>
          <table:table-cell table:style-name="Table2.D1" office:value-type="string">
            <text:h text:style-name="P3" text:outline-level="1">Docker containerization</text:h>
          </table:table-cell>
        </table:table-row>
        <table:table-row>
          <table:table-cell table:style-name="Table2.A1" office:value-type="string">
            <text:h text:style-name="P3" text:outline-level="1">Swagger</text:h>
          </table:table-cell>
          <table:table-cell table:style-name="Table2.A1" office:value-type="string">
            <text:h text:style-name="P3" text:outline-level="1">JWT tokens</text:h>
          </table:table-cell>
          <table:table-cell table:style-name="Table2.A1" office:value-type="string">
            <text:h text:style-name="P3" text:outline-level="1">CORS</text:h>
          </table:table-cell>
          <table:table-cell table:style-name="Table2.D1" office:value-type="string">
            <text:h text:style-name="P3" text:outline-level="1">API documentation</text:h>
          </table:table-cell>
        </table:table-row>
        <table:table-row>
          <table:table-cell table:style-name="Table2.A1" office:value-type="string">
            <text:h text:style-name="P3" text:outline-level="1">Postman</text:h>
          </table:table-cell>
          <table:table-cell table:style-name="Table2.A1" office:value-type="string">
            <text:h text:style-name="P3" text:outline-level="1">API integration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h text:style-name="P3" text:outline-level="1">Swagger UI</text:h>
          </table:table-cell>
        </table:table-row>
        <table:table-row>
          <table:table-cell table:style-name="Table2.A1" office:value-type="string">
            <text:h text:style-name="P3" text:outline-level="1">Docker</text:h>
          </table:table-cell>
          <table:table-cell table:style-name="Table2.A1" office:value-type="string">
            <text:h text:style-name="P3" text:outline-level="1">error handling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h text:style-name="P3" text:outline-level="1">Postman testing</text:h>
          </table:table-cell>
        </table:table-row>
        <table:table-row>
          <table:table-cell table:style-name="Table2.A1" office:value-type="string">
            <text:h text:style-name="P3" text:outline-level="1">Material UI</text:h>
          </table:table-cell>
          <table:table-cell table:style-name="Table2.A1" office:value-type="string">
            <text:h text:style-name="P3" text:outline-level="1">database schema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Vercel</text:h>
          </table:table-cell>
          <table:table-cell table:style-name="Table2.A1" office:value-type="string">
            <text:h text:style-name="P3" text:outline-level="1">customer service chat bot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Render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Railway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Cypress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Jest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Supertest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Twilio API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Socket.IO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Jitsi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Nodemailer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1" office:value-type="string">
            <text:h text:style-name="P3" text:outline-level="1">Figma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A1" office:value-type="string">
            <text:h text:style-name="P5" text:outline-level="1"> </text:h>
          </table:table-cell>
          <table:table-cell table:style-name="Table2.D1" office:value-type="string">
            <text:p text:style-name="Table_20_Contents"/>
          </table:table-cell>
        </table:table-row>
      </table:table>
      <text:h text:style-name="P1" text:outline-level="1">Questions</text:h>
      <text:h text:style-name="P6" text:outline-level="2">Technical Stack Keywords</text:h>
      <text:h text:style-name="P4" text:outline-level="1">- What is React and how does it help build interactive UIs?</text:h>
      <text:h text:style-name="P4" text:outline-level="1">- How does TypeScript improve reliability and maintainability in large projects?</text:h>
      <text:h text:style-name="P4" text:outline-level="1">- How does Express.js simplify server-side routing and middleware?</text:h>
      <text:h text:style-name="P4" text:outline-level="1">- What is MongoDB and how is data stored differently than in SQL databases?</text:h>
      <text:h text:style-name="P4" text:outline-level="1">- What problem does JWT authentication solve, and how does it work?</text:h>
      <text:h text:style-name="P4" text:outline-level="1">- What is a REST API and what are its core principles?</text:h>
      <text:h text:style-name="P4" text:outline-level="1">- How does Swagger help document and test APIs?</text:h>
      <text:h text:style-name="P4" text:outline-level="1">- What is Postman used for in backend development?</text:h>
      <text:h text:style-name="P4" text:outline-level="1">- How does Docker help in deploying consistent environments?</text:h>
      <text:h text:style-name="P4" text:outline-level="1">- Why use Material UI in a React project?</text:h>
      <text:h text:style-name="P4" text:outline-level="1">- What services like Vercel, Render, or Railway offer for app hosting?</text:h>
      <text:h text:style-name="P4" text:outline-level="1">- What is Cypress and how is it used for frontend testing?</text:h>
      <text:h text:style-name="P4" text:outline-level="1">- What is Jest and what types of tests can it perform?</text:h>
      <text:h text:style-name="P4" text:outline-level="1">- What is Supertest and how is it used in backend API testing?</text:h>
      <text:h text:style-name="P4" text:outline-level="1">- What is Socket.IO and how does it enable real-time communication?</text:h>
      <text:h text:style-name="P4" text:outline-level="1">- How is Jitsi used for implementing video calls in a web app?</text:h>
      <text:h text:style-name="P4" text:outline-level="1">- What is Nodemailer and how do you send emails from Node.js?</text:h>
      <text:h text:style-name="P4" text:outline-level="1">- Why would you use Figma in a full-stack project workflow?</text:h>
      <text:p text:style-name="Text_20_body"/>
      <text:h text:style-name="P6" text:outline-level="2">Functional / Feature Keywords</text:h>
      <text:h text:style-name="P4" text:outline-level="1">- How does user registration typically work in web applications?</text:h>
      <text:h text:style-name="P4" text:outline-level="1">- What are the steps in a secure login system?</text:h>
      <text:h text:style-name="P4" text:outline-level="1">- What should happen when a user logs out?</text:h>
      <text:h text:style-name="P4" text:outline-level="1">- Why is account verification important and how can it be implemented?</text:h>
      <text:h text:style-name="P4" text:outline-level="1">- How does a money transfer process ensure data accuracy and security?</text:h>
      <text:h text:style-name="P4" text:outline-level="1">- How do you ensure that each email is unique in user registration?</text:h>
      <text:h text:style-name="P4" text:outline-level="1">- What is session management and how does JWT help with it?</text:h>
      <text:h text:style-name="P4" text:outline-level="1">- How are JWT tokens created, validated, and refreshed?</text:h>
      <text:h text:style-name="P4" text:outline-level="1">- How should errors be handled gracefully in a web application?</text:h>
      <text:h text:style-name="P4" text:outline-level="1">- How can a customer service chatbot improve user experience?</text:h>
      <text:h text:style-name="P4" text:outline-level="1">- How Password kept in DB ?</text:h>
      <text:p text:style-name="Text_20_body"/>
      <text:h text:style-name="P6" text:outline-level="2">Security &amp; Architecture Keywords</text:h>
      <text:h text:style-name="P4" text:outline-level="1">- What is authentication and how is it implemented in Node.js apps?</text:h>
      <text:h text:style-name="P4" text:outline-level="1">- What is encryption and where is it used in a banking system?</text:h>
      <text:h text:style-name="P4" text:outline-level="1">- What role do JWT tokens play in securing communication?</text:h>
      <text:h text:style-name="P4" text:outline-level="1">- How can you secure a REST API against unauthorized access?</text:h>
      <text:h text:style-name="P4" text:outline-level="1">- Why is data validation important, and what libraries help achieve it?</text:h>
      <text:h text:style-name="P4" text:outline-level="1">- How does session security protect user data?</text:h>
      <text:h text:style-name="P4" text:outline-level="1">- What is CORS, and why must it be configured properly in web apps?</text:h>
      <text:p text:style-name="Text_20_body"><text:span text:style-name="T7"><text:line-break/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2:43:16.339455507</meta:creation-date>
    <dc:date>2026-04-26T12:44:20.554909049</dc:date>
    <meta:editing-duration>PT1M5S</meta:editing-duration>
    <meta:editing-cycles>1</meta:editing-cycles>
    <meta:document-statistic meta:table-count="2" meta:image-count="0" meta:object-count="0" meta:page-count="1" meta:paragraph-count="245" meta:word-count="1131" meta:character-count="6447" meta:non-whitespace-character-count="5461"/>
    <meta:generator>LibreOffice/24.2.7.2$Linux_X86_64 LibreOffice_project/420$Build-2</meta:generator>
  </office:meta>
</office:document-meta>
</file>